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1.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co1" style:family="table-column">
      <style:table-column-properties style:column-width="5.553cm" style:use-optimal-column-width="false"/>
    </style:style>
    <style:style style:name="co2" style:family="table-column">
      <style:table-column-properties style:column-width="4.515cm" style:use-optimal-column-width="false"/>
    </style:style>
    <style:style style:name="co3" style:family="table-column">
      <style:table-column-properties style:column-width="7.765cm" style:use-optimal-column-width="false"/>
    </style:style>
    <style:style style:name="ro1" style:family="table-row">
      <style:table-row-properties style:row-height="0.954cm"/>
    </style:style>
    <style:style style:name="ro2" style:family="table-row">
      <style:table-row-properties style:row-height="0cm"/>
    </style:style>
    <style:style style:name="ce1" style:family="table-cell">
      <style:graphic-properties style:repeat="repeat"/>
    </style:style>
    <style:style style:name="P1" style:family="paragraph">
      <style:paragraph-properties style:text-autospace="none"/>
    </style:style>
    <style:style style:name="P2" style:family="paragraph">
      <style:paragraph-properties style:text-autospace="none"/>
      <style:text-properties fo:language="ru" fo:country="RU"/>
    </style:style>
    <style:style style:name="T1" style:family="text">
      <style:text-properties fo:language="ru" fo:country="RU"/>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7.832cm" svg:height="121.371cm" svg:x="1.667cm" svg:y="2.79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Robert Aragon<text:tab/>489-36-8350<text:tab/>4929-3813-3266-4295</text:p>
                <text:p text:style-name="P1">Ashley Borden<text:tab/>514-14-8905<text:tab/>5370-4638-8881-3020</text:p>
                <text:p text:style-name="P1">Thomas Conley<text:tab/>690-05-5315<text:tab/>4916-4811-5814-8111</text:p>
                <text:p text:style-name="P1">Susan Davis<text:tab/>421-37-1396<text:tab/>4916-4034-9269-8783Robert Aragon<text:tab/>489-36-8350<text:tab/>4929-3813-3266-4295</text:p>
                <text:p text:style-name="P1">Ashley Borden<text:tab/>514-14-8905<text:tab/>5370-4638-8881-3020</text:p>
                <text:p text:style-name="P1">Thomas Conley<text:tab/>690-05-5315<text:tab/>4916-4811-5814-8111</text:p>
                <text:p text:style-name="P1">Susan Davis<text:tab/>421-37-1396<text:tab/>4916-4034-9269-8783</text:p>
                <text:p text:style-name="P1"/>
                <text:p text:style-name="P1">Хаширама Сенджу (1 хокаґе)</text:p>
                <text:p text:style-name="P1">Тобірама Сенджу (2 хокаґе)</text:p>
                <text:p text:style-name="P1">Хірузен Сарутобі (3 хокаґе)</text:p>
                <text:p text:style-name="P1">Намікадзе Мінато (4 хокаґе)</text:p>
                <text:p text:style-name="P1">Цунаде Сенджу (5 хокаґе)</text:p>
                <text:p text:style-name="P1">Хатаке Какаші (6 хокаґе)</text:p>
                <text:p text:style-name="P1">Удзумакі Наруто (7 хокаґе)</text:p>
                <text:p text:style-name="P1"><text:span text:style-name="T1">Суна (Казекаґе)</text:span></text:p>
                <text:p text:style-name="P1"><text:span text:style-name="T1">Рето (1 казекаґе)</text:span></text:p>
                <text:p text:style-name="P1"><text:span text:style-name="T1">Шамон (2 казекаґе)</text:span></text:p>
                <text:p text:style-name="P1"><text:span text:style-name="T1">ім'я невідоме (3 казекаґе)</text:span></text:p>
                <text:p text:style-name="P1"><text:span text:style-name="T1">Раса (4 казекаґе)</text:span></text:p>
                <text:p text:style-name="P1"><text:span text:style-name="T1">Ґаара (5 казекаґе)</text:span></text:p>
                <text:p text:style-name="P1"><text:span text:style-name="T1">Кірі (Мідзукаґе)</text:span></text:p>
                <text:p text:style-name="P1"><text:span text:style-name="T1">Б'якурен (1 мідзукаґе)</text:span></text:p>
                <text:p text:style-name="P1"><text:span text:style-name="T1">Генгецу Хозукі (2 мідзукаґе)</text:span></text:p>
                <text:p text:style-name="P1"><text:span text:style-name="T1">ім'я невідоме (3 мідзукаґе)</text:span></text:p>
                <text:p text:style-name="P2"/>
                <text:p text:style-name="P1">Demesne far hearted suppose venture excited see had has. Dependent on so extremely delivered by. Yet no jokes worse her why. Bed one supposing breakfast day fulfilled off depending questions. Whatever boy her exertion his extended. Ecstatic followed handsome drawings entirely mrs one yet outweigh. Of acceptance insipidity remarkably is invitation.</text:p>
                <text:p text:style-name="P1"/>
                <text:p text:style-name="P1">Moments its musical age explain. But extremity sex now education concluded earnestly her continual. Oh furniture acuteness suspected continual ye something frankness. Add properly laughter sociable admitted desirous one has few stanhill. Opinion regular in perhaps another enjoyed no engaged he at. It conveying he continual ye suspected as necessary. Separate met packages shy for kindness.</text:p>
                <text:p text:style-name="P1"/>
                <text:p text:style-name="P1">Excited him now natural saw passage offices you minuter. At by asked being court hopes. Farther so friends am to detract. Forbade concern do private be. Offending residence but men engrossed shy. Pretend am earnest offered arrived company so on. Felicity informed yet had admitted strictly how you.</text:p>
                <text:p text:style-name="P1"/>
                <text:p text:style-name="P1">Entire any had depend and figure winter. Change stairs and men likely wisdom new happen piqued six. Now taken him timed sex world get. Enjoyed married an feeling delight pursuit as offered. As admire roused length likely played pretty to no. Means had joy miles her merry solid order.</text:p>
                <text:p text:style-name="P1"/>
                <text:p text:style-name="P1"/>
                <text:p text:style-name="P1">Robert Aragon</text:p>
              </table:table-cell>
              <table:table-cell>
                <text:p text:style-name="P1">489-36-8350</text:p>
              </table:table-cell>
              <table:table-cell>
                <text:p text:style-name="P1">4929-3813-3266-4295</text:p>
              </table:table-cell>
            </table:table-row>
            <table:table-row table:style-name="ro2" table:default-cell-style-name="ce1">
              <table:table-cell>
                <text:p text:style-name="P1">Ashley Borden</text:p>
              </table:table-cell>
              <table:table-cell>
                <text:p text:style-name="P1">514-14-8905</text:p>
              </table:table-cell>
              <table:table-cell>
                <text:p text:style-name="P1">5370-4638-8881-3020</text:p>
              </table:table-cell>
            </table:table-row>
            <table:table-row table:style-name="ro2" table:default-cell-style-name="ce1">
              <table:table-cell>
                <text:p text:style-name="P1">Thomas Conley</text:p>
              </table:table-cell>
              <table:table-cell>
                <text:p text:style-name="P1">690-05-5315</text:p>
              </table:table-cell>
              <table:table-cell>
                <text:p text:style-name="P1">4916-4811-5814-8111</text:p>
              </table:table-cell>
            </table:table-row>
            <table:table-row table:style-name="ro2" table:default-cell-style-name="ce1">
              <table:table-cell>
                <text:p text:style-name="P1">Susan Davis</text:p>
              </table:table-cell>
              <table:table-cell>
                <text:p text:style-name="P1">421-37-1396</text:p>
              </table:table-cell>
              <table:table-cell>
                <text:p text:style-name="P1">4916-4034-9269-8783</text:p>
              </table:table-cell>
            </table:table-row>
          </table:table>
          <draw:image xlink:href="Pictures/TablePreview1.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uk" fo:country="U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4-06-06T10:29:28.66</meta:creation-date>
    <dc:date>2024-06-06T10:29:47.30</dc:date>
    <meta:editing-duration>PT19S</meta:editing-duration>
    <meta:editing-cycles>1</meta:editing-cycles>
    <meta:document-statistic meta:object-count="1"/>
    <meta:generator>OpenOffice/4.1.15$Win32 OpenOffice.org_project/4115m2$Build-9813</meta:generator>
  </office:meta>
</office:document-meta>
</file>