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3.364cm"/>
    </style:style>
    <style:style style:name="P1" style:family="paragraph">
      <style:paragraph-properties style:text-autospace="none"/>
      <style:text-properties fo:font-size="10pt" style:font-size-asian="10pt" style:font-size-complex="10pt"/>
    </style:style>
    <style:style style:name="P2" style:family="paragraph">
      <style:paragraph-properties style:text-autospace="none"/>
      <style:text-properties fo:font-size="10pt" fo:language="ru" fo:country="RU" style:font-size-asian="10pt" style:font-size-complex="10pt"/>
    </style:style>
    <style:style style:name="P3" style:family="paragraph">
      <style:paragraph-properties style:text-autospace="none"/>
      <style:text-properties fo:font-size="10pt" style:font-size-asian="10pt" style:font-family-complex="'Lohit Devanagari'" style:font-pitch-complex="variable" style:font-size-complex="10pt"/>
    </style:style>
    <style:style style:name="P4" style:family="paragraph">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language="ru" fo:country="RU"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4" draw:layer="layout" svg:width="25.199cm" svg:height="21.396cm" svg:x="1.4cm" svg:y="1.138cm" presentation:class="subtitle" presentation:user-transformed="true">
          <draw:text-box>
            <text:p text:style-name="P1"><text:span text:style-name="T1">Robert Aragon</text:span><text:span text:style-name="T1"><text:tab/></text:span><text:span text:style-name="T1">489-36-8350</text:span><text:span text:style-name="T1"><text:tab/></text:span><text:span text:style-name="T1">4929-3813-3266-4295</text:span></text:p>
            <text:p text:style-name="P1"><text:span text:style-name="T1">Ashley Borden</text:span><text:span text:style-name="T1"><text:tab/></text:span><text:span text:style-name="T1">514-14-8905</text:span><text:span text:style-name="T1"><text:tab/></text:span><text:span text:style-name="T1">5370-4638-8881-3020</text:span></text:p>
            <text:p text:style-name="P1"><text:span text:style-name="T1">Thomas Conley</text:span><text:span text:style-name="T1"><text:tab/></text:span><text:span text:style-name="T1">690-05-5315</text:span><text:span text:style-name="T1"><text:tab/></text:span><text:span text:style-name="T1">4916-4811-5814-8111</text:span></text:p>
            <text:p text:style-name="P1"><text:span text:style-name="T1">Susan Davis</text:span><text:span text:style-name="T1"><text:tab/></text:span><text:span text:style-name="T1">421-37-1396</text:span><text:span text:style-name="T1"><text:tab/></text:span><text:span text:style-name="T1">4916-4034-9269-8783Robert Aragon</text:span><text:span text:style-name="T1"><text:tab/></text:span><text:span text:style-name="T1">489-36-8350</text:span><text:span text:style-name="T1"><text:tab/></text:span><text:span text:style-name="T1">4929-3813-3266-4295</text:span></text:p>
            <text:p text:style-name="P1"><text:span text:style-name="T1">Ashley Borden</text:span><text:span text:style-name="T1"><text:tab/></text:span><text:span text:style-name="T1">514-14-8905</text:span><text:span text:style-name="T1"><text:tab/></text:span><text:span text:style-name="T1">5370-4638-8881-3020</text:span></text:p>
            <text:p text:style-name="P1"><text:span text:style-name="T1">Thomas Conley</text:span><text:span text:style-name="T1"><text:tab/></text:span><text:span text:style-name="T1">690-05-5315</text:span><text:span text:style-name="T1"><text:tab/></text:span><text:span text:style-name="T1">4916-4811-5814-8111</text:span></text:p>
            <text:p text:style-name="P1"><text:span text:style-name="T1">Susan Davis</text:span><text:span text:style-name="T1"><text:tab/></text:span><text:span text:style-name="T1">421-37-1396</text:span><text:span text:style-name="T1"><text:tab/></text:span><text:span text:style-name="T1">4916-4034-9269-8783</text:span></text:p>
            <text:p text:style-name="P1"><text:span text:style-name="T1"/></text:p>
            <text:p text:style-name="P1"><text:span text:style-name="T1">Хаширама Сенджу (1 хокаґе)</text:span></text:p>
            <text:p text:style-name="P1"><text:span text:style-name="T1">Тобірама Сенджу (2 хокаґе)</text:span></text:p>
            <text:p text:style-name="P1"><text:span text:style-name="T1">Хірузен Сарутобі (3 хокаґе)</text:span></text:p>
            <text:p text:style-name="P1"><text:span text:style-name="T1">Намікадзе Мінато (4 хокаґе)</text:span></text:p>
            <text:p text:style-name="P1"><text:span text:style-name="T1">Цунаде Сенджу (5 хокаґе)</text:span></text:p>
            <text:p text:style-name="P1"><text:span text:style-name="T1">Хатаке Какаші (6 хокаґе)</text:span></text:p>
            <text:p text:style-name="P1"><text:span text:style-name="T1">Удзумакі Наруто (7 хокаґе)</text:span></text:p>
            <text:p text:style-name="P1"><text:span text:style-name="T2">Суна (Казекаґе)</text:span></text:p>
            <text:p text:style-name="P1"><text:span text:style-name="T2">Рето (1 казекаґе)</text:span></text:p>
            <text:p text:style-name="P1"><text:span text:style-name="T2">Шамон (2 казекаґе)</text:span></text:p>
            <text:p text:style-name="P1"><text:span text:style-name="T2">ім'я невідоме (3 казекаґе)</text:span></text:p>
            <text:p text:style-name="P1"><text:span text:style-name="T2">Раса (4 казекаґе)</text:span></text:p>
            <text:p text:style-name="P1"><text:span text:style-name="T2">Ґаара (5 казекаґе)</text:span></text:p>
            <text:p text:style-name="P1"><text:span text:style-name="T2">Кірі (Мідзукаґе)</text:span></text:p>
            <text:p text:style-name="P1"><text:span text:style-name="T2">Б'якурен (1 мідзукаґе)</text:span></text:p>
            <text:p text:style-name="P1"><text:span text:style-name="T2">Генгецу Хозукі (2 мідзукаґе)</text:span></text:p>
            <text:p text:style-name="P1"><text:span text:style-name="T2">ім'я невідоме (3 мідзукаґе)</text:span></text:p>
            <text:p text:style-name="P2"><text:span text:style-name="T1"/></text:p>
            <text:p text:style-name="P1"><text:span text:style-name="T1">Demesne far hearted suppose venture excited see had has. Dependent on so extremely delivered by. Yet no jokes worse her why. Bed one supposing breakfast day fulfilled off depending questions. Whatever boy her exertion his extended. Ecstatic followed handsome drawings entirely mrs one yet outweigh. Of acceptance insipidity remarkably is invitation.</text:span></text:p>
            <text:p text:style-name="P1"><text:span text:style-name="T1"/></text:p>
            <text:p text:style-name="P1"><text:span text:style-name="T1">Moments its musical age explain. But extremity sex now education concluded earnestly her continual. Oh furniture acuteness suspected continual ye something frankness. Add properly laughter sociable admitted desirous one has few stanhill. Opinion regular in perhaps another enjoyed no engaged he at. It conveying he continual ye suspected as necessary. Separate met packages shy for kindness.</text:span></text:p>
            <text:p text:style-name="P1"><text:span text:style-name="T1"/></text:p>
            <text:p text:style-name="P1"><text:span text:style-name="T1">Excited him now natural saw passage offices you minuter. At by asked being court hopes. Farther so friends am to detract. Forbade concern do private be. Offending residence but men engrossed shy. Pretend am earnest offered arrived company so on. Felicity informed yet had admitted strictly how you.</text:span></text:p>
            <text:p text:style-name="P1"><text:span text:style-name="T1"/></text:p>
            <text:p text:style-name="P1"><text:span text:style-name="T1">Entire any had depend and figure winter. Change stairs and men likely wisdom new happen piqued six. Now taken him timed sex world get. Enjoyed married an feeling delight pursuit as offered. As admire roused length likely played pretty to no. Means had joy miles her merry solid order.</text:span></text:p>
            <text:p text:style-name="P1"><text:span text:style-name="T1"/></text:p>
            <text:p text:style-name="P1"><text:span text:style-name="T1"/></text:p>
            <text:p text:style-name="P1"><text:span text:style-name="T1">Robert Aragon</text:span></text:p>
            <text:p text:style-name="P1"><text:span text:style-name="T1">489-36-8350</text:span></text:p>
            <text:p text:style-name="P1"><text:span text:style-name="T1">4929-3813-3266-4295</text:span></text:p>
            <text:p text:style-name="P1"><text:span text:style-name="T1">Ashley Borden</text:span></text:p>
            <text:p text:style-name="P1"><text:span text:style-name="T1">514-14-8905</text:span></text:p>
            <text:p text:style-name="P1"><text:span text:style-name="T1">5370-4638-8881-3020</text:span></text:p>
            <text:p text:style-name="P1"><text:span text:style-name="T1">Thomas Conley</text:span></text:p>
            <text:p text:style-name="P1"><text:span text:style-name="T1">690-05-5315</text:span></text:p>
            <text:p text:style-name="P1"><text:span text:style-name="T1">4916-4811-5814-8111</text:span></text:p>
            <text:p text:style-name="P1"><text:span text:style-name="T1">Susan Davis</text:span></text:p>
            <text:p text:style-name="P1"><text:span text:style-name="T1">421-37-1396</text:span></text:p>
            <text:p text:style-name="P1"><text:span text:style-name="T1">4916-4034-9269-8783</text:span></text:p>
            <text:p text:style-name="P1"><text:span text:style-name="T1"/></text:p>
            <text:p text:style-name="P3"><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uk" fo:country="U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family="'Liberation Serif', 'Times New Roman'" style:font-family-generic="roman" style:font-pitch="variable" fo:font-size="12pt" fo:language="en" fo:country="US" style:letter-kerning="true" style:font-family-asian="'Noto Serif CJK SC'" style:font-family-generic-asian="roman" style:font-pitch-asian="variable" style:font-size-asian="12pt" style:language-asian="zh" style:country-asian="CN" style:font-family-complex="'Liberation Serif', 'Times New Roman'" style:font-family-generic-complex="roman" style:font-pitch-complex="variable" style:font-size-complex="12pt" style:language-complex="hi" style:country-complex="IN"/>
    </style:style>
    <style:style style:name="Default_20_Paragraph_20_Font" style:display-name="Default Paragraph Font" style:family="graphic">
      <style:paragraph-properties style:text-autospace="none"/>
    </style:style>
    <style:style style:name="Standard" style:family="graphic">
      <style:paragraph-properties fo:margin-left="0cm" fo:margin-right="0cm" fo:text-align="start" fo:text-indent="0cm" style:text-autospace="ideograph-alpha"/>
      <style:text-properties fo:font-family="'Liberation Serif', 'Times New Roman'" style:font-family-generic="roman" style:font-pitch="variable" fo:font-size="12pt" fo:language="en" fo:country="US" style:letter-kerning="true" style:font-family-asian="'Noto Serif CJK SC'" style:font-family-generic-asian="roman" style:font-pitch-asian="variable" style:font-size-asian="12pt" style:language-asian="zh" style:country-asian="CN" style:font-family-complex="'Liberation Serif', 'Times New Roman'" style:font-family-generic-complex="roman" style:font-pitch-complex="variable" style:font-size-complex="12pt" style:language-complex="hi" style:country-complex="IN"/>
    </style:style>
    <style:style style:name="Table_20_Contents" style:display-name="Table Contents" style:family="graphic">
      <style:paragraph-properties fo:margin-left="0cm" fo:margin-right="0cm" fo:text-align="start" fo:text-indent="0cm" style:text-autospace="ideograph-alpha"/>
      <style:text-properties fo:font-family="'Liberation Serif', 'Times New Roman'" style:font-family-generic="roman" style:font-pitch="variable" fo:font-size="12pt" fo:language="en" fo:country="US" style:letter-kerning="true" style:font-family-asian="'Noto Serif CJK SC'" style:font-family-generic-asian="roman" style:font-pitch-asian="variable" style:font-size-asian="12pt" style:language-asian="zh" style:country-asian="CN" style:font-family-complex="'Liberation Serif', 'Times New Roman'" style:font-family-generic-complex="roman" style:font-pitch-complex="variable" style:font-size-complex="12pt" style:language-complex="hi" style:country-complex="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4-06-06T10:28:44.79</meta:creation-date>
    <meta:editing-duration>PT27S</meta:editing-duration>
    <meta:editing-cycles>2</meta:editing-cycles>
    <dc:date>2024-06-06T10:29:05.19</dc:date>
    <meta:document-statistic meta:object-count="25"/>
    <meta:generator>OpenOffice/4.1.15$Win32 OpenOffice.org_project/4115m2$Build-9813</meta:generator>
  </office:meta>
</office:document-meta>
</file>